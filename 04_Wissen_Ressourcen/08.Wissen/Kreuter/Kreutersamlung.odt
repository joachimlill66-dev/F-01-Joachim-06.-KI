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EE000001F4224F2DC3.jpg"/>
  <manifest:file-entry manifest:media-type="image/jpeg" manifest:full-path="Pictures/10000000000002EE00000233438E555B.jpg"/>
  <manifest:file-entry manifest:media-type="image/jpeg" manifest:full-path="Pictures/1000000000000400000002AB0AA8355B.jpg"/>
  <manifest:file-entry manifest:media-type="image/jpeg" manifest:full-path="Pictures/10000000000001F40000014D9D19BC3C.jpg"/>
  <manifest:file-entry manifest:media-type="image/jpeg" manifest:full-path="Pictures/10000000000002EE000002333B4B981E.jpg"/>
  <manifest:file-entry manifest:media-type="image/jpeg" manifest:full-path="Pictures/10000000000003C000000280C6795475.jpg"/>
  <manifest:file-entry manifest:media-type="image/jpeg" manifest:full-path="Pictures/10000000000002EE000002336207B910.jpg"/>
  <manifest:file-entry manifest:media-type="image/jpeg" manifest:full-path="Pictures/10000000000002EE00000233A8A27579.jpg"/>
  <manifest:file-entry manifest:media-type="image/jpeg" manifest:full-path="Pictures/10000000000003C0000002D03A33C8C5.jpg"/>
  <manifest:file-entry manifest:media-type="image/jpeg" manifest:full-path="Pictures/10000000000001F30000014D3BEE2AE8.jpg"/>
  <manifest:file-entry manifest:media-type="image/jpeg" manifest:full-path="Pictures/10000000000002EE000001A7EB819219.jpg"/>
  <manifest:file-entry manifest:media-type="image/jpeg" manifest:full-path="Pictures/10000000000003C0000002802E243BB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Bold" svg:font-family="MontserratBold, sans-serif"/>
    <style:font-face style:name="PT Serif" svg:font-family="'PT Serif', serif"/>
    <style:font-face style:name="Raleway" svg:font-family="Raleway, sans-serif"/>
    <style:font-face style:name="Roboto" svg:font-family="Robo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13131" style:font-name="Raleway" fo:font-size="16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13131" style:font-name="PT Serif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13131" style:font-name="Raleway" fo:font-size="16.5pt" fo:letter-spacing="normal" fo:font-style="normal" fo:font-weight="bold"/>
    </style:style>
    <style:style style:name="T2" style:family="text">
      <style:text-properties fo:font-variant="normal" fo:text-transform="none" fo:color="#313131" style:font-name="Raleway" fo:font-size="16.5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313131" style:font-name="Raleway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313131" style:font-name="Raleway" fo:font-size="16pt" fo:letter-spacing="normal" fo:font-style="normal" fo:font-weight="bold" style:font-size-asian="16pt" style:font-size-complex="16pt"/>
    </style:style>
    <style:style style:name="T5" style:family="text">
      <style:text-properties fo:font-variant="normal" fo:text-transform="none" fo:color="#414042" style:font-name="MontserratBold" fo:font-size="16pt" fo:letter-spacing="normal" fo:font-style="normal" fo:font-weight="bold" style:font-size-asian="16pt" style:font-size-complex="16pt"/>
    </style:style>
    <style:style style:name="T6" style:family="text">
      <style:text-properties fo:font-variant="normal" fo:text-transform="none" fo:color="#414042" style:font-name="MontserratBold" fo:font-size="12pt" fo:letter-spacing="normal" fo:font-style="normal" fo:font-weight="bold" style:font-size-asian="12pt" style:font-size-complex="12pt"/>
    </style:style>
    <style:style style:name="T7" style:family="text">
      <style:text-properties fo:color="#313131" style:font-name="Raleway" fo:font-size="12pt" fo:font-weight="bold" style:font-size-asian="12pt" style:font-size-complex="12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03cm" svg:y="0.053cm" svg:width="3.762cm" svg:height="1.868cm" draw:z-index="0"><draw:image xlink:href="Pictures/10000000000003C000000280C6795475.jpg" xlink:type="simple" xlink:show="embed" xlink:actuate="onLoad"/></draw:frame> <text:bookmark text:name="link2"/><text:bookmark text:name="Basilikum_Der_Star_unter_den_Kuechenkraeutern"/><text:span text:style-name="T1">Basilikum</text:span></text:p>
      <text:p text:style-name="Standard"><text:bookmark text:name="link21"/><text:bookmark text:name="Basilikum_Der_Star_unter_den_Kuechenkraeutern1"/><text:span text:style-name="T1"><text:s/></text:span><text:span text:style-name="T3">Der Star unter den Küchenkräutern</text:span></text:p>
      <text:p text:style-name="P3"/>
      <text:p text:style-name="P3"/>
      <text:p text:style-name="Standard"><draw:frame draw:style-name="fr2" draw:name="Grafik2" text:anchor-type="paragraph" svg:x="0.035cm" svg:y="0cm" svg:width="3.819cm" svg:height="1.923cm" draw:z-index="1"><draw:image xlink:href="Pictures/10000000000003C0000002D03A33C8C5.jpg" xlink:type="simple" xlink:show="embed" xlink:actuate="onLoad"/></draw:frame> <text:bookmark text:name="link3"/><text:bookmark text:name="Rosmarin_ganz_fantastisch_zu_Wild_und_Kartoffeln"/><text:span text:style-name="T1">Rosmarin</text:span></text:p>
      <text:h text:style-name="Heading_20_2" text:outline-level="2"><text:bookmark text:name="link31"/><text:bookmark text:name="Rosmarin_ganz_fantastisch_zu_Wild_und_Kartoffeln1"/><text:span text:style-name="T3"><text:s/>ganz fantastisch zu Wild und Kartoffeln</text:span></text:h>
      <text:h text:style-name="Heading_20_2" text:outline-level="2"><draw:frame draw:style-name="fr3" draw:name="Grafik3" text:anchor-type="paragraph" svg:x="-0.058cm" svg:y="0.434cm" svg:width="3.845cm" svg:height="2.302cm" draw:z-index="2"><draw:image xlink:href="Pictures/10000000000003C0000002802E243BBC.jpg" xlink:type="simple" xlink:show="embed" xlink:actuate="onLoad"/></draw:frame><text:bookmark text:name="link4"/><text:bookmark text:name="Minze_fuer_die_Frische"/><text:span text:style-name="T3"> </text:span><text:span text:style-name="T1">Minze</text:span></text:h>
      <text:h text:style-name="Heading_20_2" text:outline-level="2"><text:span text:style-name="T2"><text:s/></text:span><text:span text:style-name="T3">für die Frische</text:span></text:h>
      <text:p text:style-name="Text_20_body"><draw:frame draw:style-name="fr2" draw:name="Grafik4" text:anchor-type="paragraph" svg:x="0cm" svg:y="0.46cm" svg:width="3.792cm" svg:height="1.834cm" draw:z-index="3"><draw:image xlink:href="Pictures/10000000000002EE000002336207B910.jpg" xlink:type="simple" xlink:show="embed" xlink:actuate="onLoad"/></draw:frame><text:span text:style-name="T3"/></text:p>
      <text:p text:style-name="Text_20_body"><text:span text:style-name="T3"><text:s/></text:span><text:bookmark text:name="link6"/><text:bookmark text:name="Dill_ein_Klassiker_in_Salaten_und_bei_Fischgerichten"/><text:span text:style-name="T4">Dill</text:span></text:p>
      <text:p text:style-name="Text_20_body"><text:span text:style-name="T3"><text:s/>ein Klassiker in Salaten und bei Fischgerichten</text:span></text:p>
      <text:p text:style-name="Text_20_body"><text:span text:style-name="T3"/></text:p>
      <text:p text:style-name="Text_20_body"><draw:frame draw:style-name="fr2" draw:name="Grafik5" text:anchor-type="paragraph" svg:x="0cm" svg:y="-0.212cm" svg:width="3.845cm" svg:height="1.877cm" draw:z-index="4"><draw:image xlink:href="Pictures/10000000000002EE000001A7EB819219.jpg" xlink:type="simple" xlink:show="embed" xlink:actuate="onLoad"/></draw:frame><text:span text:style-name="T3"> </text:span><text:bookmark text:name="link7"/><text:bookmark text:name="Schnittlauch_ideal_zu_Ruehrei"/><text:span text:style-name="T4">Schnittlauch</text:span></text:p>
      <text:p text:style-name="Text_20_body"><text:span text:style-name="T3"><text:s/>ideal zu Rührei</text:span></text:p>
      <text:p text:style-name="Text_20_body"><draw:frame draw:style-name="fr2" draw:name="Grafik6" text:anchor-type="paragraph" svg:x="0.016cm" svg:y="0.407cm" svg:width="3.856cm" svg:height="2.104cm" draw:z-index="5"><draw:image xlink:href="Pictures/10000000000002EE000002333B4B981E.jpg" xlink:type="simple" xlink:show="embed" xlink:actuate="onLoad"/></draw:frame><text:span text:style-name="T3"/></text:p>
      <text:p text:style-name="Text_20_body"><text:span text:style-name="T3"><text:s/></text:span><text:bookmark text:name="link8"/><text:bookmark text:name="Thymian_der_Mutige"/><text:span text:style-name="T4">Thymian</text:span></text:p>
      <text:p text:style-name="Text_20_body"><text:span text:style-name="T3"><text:s/>der Mutige</text:span></text:p>
      <text:p text:style-name="Text_20_body"><text:span text:style-name="T3"/></text:p>
      <text:p text:style-name="Text_20_body"><draw:frame draw:style-name="fr2" draw:name="Grafik7" text:anchor-type="paragraph" svg:x="0.051cm" svg:y="-0.185cm" svg:width="3.847cm" svg:height="2.12cm" draw:z-index="6"><draw:image xlink:href="Pictures/10000000000002EE00000233A8A27579.jpg" xlink:type="simple" xlink:show="embed" xlink:actuate="onLoad"/></draw:frame><text:span text:style-name="T3"> </text:span><text:bookmark text:name="link9"/><text:bookmark text:name="Petersilie_Tradition_aus_dem_heimischen_Garten"/><text:span text:style-name="T4">Petersilie</text:span></text:p>
      <text:p text:style-name="Text_20_body"><text:span text:style-name="T4"><text:s/></text:span><text:span text:style-name="T3">Tradition aus dem heimischen Garten</text:span></text:p>
      <text:p text:style-name="Text_20_body"><text:span text:style-name="T3"/></text:p>
      <text:p text:style-name="Text_20_body"><draw:frame draw:style-name="fr2" draw:name="Grafik8" text:anchor-type="paragraph" svg:x="0.056cm" svg:y="-0.159cm" svg:width="3.842cm" svg:height="1.946cm" draw:z-index="7"><draw:image xlink:href="Pictures/10000000000002EE00000233438E555B.jpg" xlink:type="simple" xlink:show="embed" xlink:actuate="onLoad"/></draw:frame><text:span text:style-name="T3"> </text:span><text:bookmark text:name="link10"/><text:bookmark text:name="Majoran_das_Wurstkraut"/><text:span text:style-name="T4">Majoran</text:span></text:p>
      <text:p text:style-name="Text_20_body"><text:span text:style-name="T3"><text:s/>das Wurstkraut</text:span></text:p>
      <text:p text:style-name="Text_20_body"><text:span text:style-name="T3"/></text:p>
      <text:p text:style-name="Text_20_body"><draw:frame draw:style-name="fr2" draw:name="Grafik9" text:anchor-type="paragraph" svg:x="0.03cm" svg:y="-0.159cm" svg:width="3.895cm" svg:height="1.803cm" draw:z-index="8"><draw:image xlink:href="Pictures/10000000000002EE000001F4224F2DC3.jpg" xlink:type="simple" xlink:show="embed" xlink:actuate="onLoad"/></draw:frame><text:span text:style-name="T3"> </text:span><text:span text:style-name="T4">Oregano</text:span></text:p>
      <text:p text:style-name="Text_20_body"><text:span text:style-name="T3"><text:s/>der Wilde</text:span></text:p>
      <text:p text:style-name="Text_20_body"><draw:frame draw:style-name="fr2" draw:name="Grafik10" text:anchor-type="paragraph" svg:x="0.086cm" svg:y="0.275cm" svg:width="3.812cm" svg:height="1.819cm" draw:z-index="9"><draw:image xlink:href="Pictures/10000000000001F40000014D9D19BC3C.jpg" xlink:type="simple" xlink:show="embed" xlink:actuate="onLoad"/></draw:frame><text:span text:style-name="T3"> </text:span></text:p>
      <text:p text:style-name="Text_20_body"><text:span text:style-name="T3"><text:s/></text:span><text:span text:style-name="T4">Borretsch</text:span></text:p>
      <text:p text:style-name="Text_20_body"><text:span text:style-name="T4"/></text:p>
      <text:p text:style-name="Text_20_body"><draw:frame draw:style-name="fr4" draw:name="Grafik12" text:anchor-type="paragraph" svg:x="0.023cm" svg:y="-0.159cm" svg:width="3.833cm" svg:height="1.967cm" draw:z-index="11"><draw:image xlink:href="Pictures/10000000000001F30000014D3BEE2AE8.jpg" xlink:type="simple" xlink:show="embed" xlink:actuate="onLoad"/></draw:frame><text:span text:style-name="T4"> <text:s/>Salbei</text:span></text:p>
      <text:p text:style-name="Text_20_body"><text:span text:style-name="T4"/></text:p>
      <text:p text:style-name="Text_20_body"><text:span text:style-name="T4"/></text:p>
      <text:p text:style-name="Text_20_body"><draw:frame draw:style-name="fr2" draw:name="Grafik11" text:anchor-type="paragraph" svg:x="0.03cm" svg:y="-0.159cm" svg:width="4.001cm" svg:height="2.385cm" draw:z-index="10"><draw:image xlink:href="Pictures/1000000000000400000002AB0AA8355B.jpg" xlink:type="simple" xlink:show="embed" xlink:actuate="onLoad"/></draw:frame><text:span text:style-name="T4"> </text:span><text:span text:style-name="Strong_20_Emphasis"><text:span text:style-name="T5">Kresse </text:span></text:span></text:p>
      <text:p text:style-name="Text_20_body"><text:span text:style-name="Strong_20_Emphasis"><text:span text:style-name="T5"><text:s/></text:span></text:span><text:span text:style-name="Strong_20_Emphasis"><text:span text:style-name="T6">als Superkraut!</text:span></text:span></text:p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P2"/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Bold" svg:font-family="MontserratBold, sans-serif"/>
    <style:font-face style:name="PT Serif" svg:font-family="'PT Serif', serif"/>
    <style:font-face style:name="Raleway" svg:font-family="Raleway, sans-serif"/>
    <style:font-face style:name="Roboto" svg:font-family="Robo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6T15:18:57.69</meta:creation-date>
    <dc:date>2020-04-26T16:51:25.75</dc:date>
    <meta:editing-duration>PT1H33M30S</meta:editing-duration>
    <meta:editing-cycles>12</meta:editing-cycles>
    <meta:generator>OpenOffice/4.1.5$Win32 OpenOffice.org_project/415m1$Build-9789</meta:generator>
    <meta:document-statistic meta:table-count="0" meta:image-count="12" meta:object-count="0" meta:page-count="2" meta:paragraph-count="23" meta:word-count="49" meta:character-count="347"/>
  </office:meta>
</office:document-meta>
</file>